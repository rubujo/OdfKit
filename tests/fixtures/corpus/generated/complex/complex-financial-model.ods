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spreadsheet" manifest:version="1.4"/>
  <manifest:file-entry manifest:full-path="META-INF/" manifest:media-type=""/>
  <manifest:file-entry manifest:full-path="Object 1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mimetype" manifest:media-type=""/>
  <manifest:file-entry manifest:full-path="Object 1/settings.xml" manifest:media-type="text/xml"/>
  <manifest:file-entry manifest:full-path="Object 1/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of="urn:oasis:names:tc:opendocument:xmlns:of:1.2" xmlns:calcext="urn:org:documentfoundation:names:experimental:calc:xmlns:calcext:1.0" xmlns:draw="urn:oasis:names:tc:opendocument:xmlns:drawing:1.0" xmlns:svg="urn:oasis:names:tc:opendocument:xmlns:svg-compatible:1.0" xmlns:xlink="http://www.w3.org/1999/xlink" office:version="1.4">
  <office:body>
    <office:spreadsheet>
      <table:table table:name="銷售">
        <table:table-row>
          <table:table-cell office:value-type="string">
            <text:p>月份</text:p>
          </table:table-cell>
          <table:table-cell office:value-type="string">
            <text:p>營收</text:p>
          </table:table-cell>
          <table:table-cell office:value-type="string">
            <text:p>成本</text:p>
          </table:table-cell>
          <table:table-cell office:value-type="string">
            <text:p>毛利</text:p>
          </table:table-cell>
        </table:table-row>
        <table:table-row>
          <table:table-cell office:value-type="string">
            <text:p>一月</text:p>
          </table:table-cell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 table:formula="of:=[.B2]-[.C2]"/>
        </table:table-row>
        <table:table-row>
          <table:table-cell office:value-type="string">
            <text:p>二月</text:p>
          </table:table-cell>
          <table:table-cell office:value-type="float" office:value="148">
            <text:p>148</text:p>
          </table:table-cell>
          <table:table-cell office:value-type="float" office:value="83">
            <text:p>83</text:p>
          </table:table-cell>
          <table:table-cell table:formula="of:=[.B3]-[.C3]"/>
        </table:table-row>
        <table:named-expressions>
          <table:named-range table:name="SalesModel" table:cell-range-address="銷售.A1:.D3"/>
        </table:named-expressions>
        <calcext:conditional-formats>
          <calcext:conditional-format calcext:target-range-address="銷售.D2:銷售.D3">
            <calcext:condition calcext:value="cell-content()&gt;50" calcext:style-name="ProfitStyle"/>
          </calcext:conditional-format>
          <calcext:conditional-format calcext:target-range-address="銷售.D2:銷售.D3">
            <calcext:data-bar calcext:max-length="10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  <table:shapes>
          <draw:frame draw:z-index="0" svg:width="12cm" svg:height="7cm" svg:x="1cm" svg:y="1cm" table:start-cell-address=".A1" table:end-cell-address=".A1" table:start-x="1cm" table:start-y="1cm" table:end-x="12cm" table:end-y="7cm">
            <draw:object xlink:href="./Object 1" xlink:type="simple" xlink:show="embed" xlink:actuate="onLoad"/>
          </draw:frame>
        </table:shapes>
      </table:table>
      <table:data-pilot-tables>
        <table:data-pilot-table table:name="SalesPivot" table:target-range-address="銷售.G1:.G1" table:buttons="銷售.G1:.G1" table:has-column-headers="true" table:has-row-headers="true">
          <table:source-cell-range table:cell-range-address="銷售.A1:.D3"/>
          <table:data-pilot-field table:source-field-name="月份" table:orientation="row"/>
          <table:data-pilot-field table:source-field-name="營收" table:orientation="data" table:function="sum"/>
        </table:data-pilot-table>
      </table:data-pilot-tables>
      <table:table table:name="摘要">
        <table:table-row>
          <table:table-cell table:formula="of:='銷售'.D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4">
  <office:styles/>
  <office:automatic-styles/>
  <office:master-styles/>
</office:document-styles>
</file>

<file path=meta.xml><?xml version="1.0" encoding="utf-8"?>
<office:document-meta xmlns:office="urn:oasis:names:tc:opendocument:xmlns:office:1.0" xmlns:meta="urn:oasis:names:tc:opendocument:xmlns:meta:1.0" office:version="1.4">
  <office:meta>
    <meta:document-statistic meta:word-count="10" meta:character-count="22" meta:paragraph-count="10" meta:table-count="2" meta:image-count="0" meta:page-count="1"/>
  </office:meta>
</office:document-meta>
</file>

<file path=Object 1/content.xml><?xml version="1.0" encoding="utf-8"?>
<office:document-content xmlns:office="urn:oasis:names:tc:opendocument:xmlns:office:1.0" xmlns:chart="urn:oasis:names:tc:opendocument:xmlns:chart:1.0" xmlns:table="urn:oasis:names:tc:opendocument:xmlns:table:1.0" xmlns:text="urn:oasis:names:tc:opendocument:xmlns:text:1.0" office:version="1.4">
  <office:body>
    <office:chart>
      <chart:chart chart:class="chart:line" table:cell-range-address="銷售.$A$1:.$D$3">
        <chart:data-source chart:has-row-headers="true" chart:has-column-headers="true"/>
        <chart:plot-area>
          <chart:axis chart:dimension="x">
            <chart:categories table:cell-range-address="銷售.$A$2:.$A$3"/>
          </chart:axis>
          <chart:series chart:values-cell-range-address="銷售.$B$2:.$B$3" table:cell-range-address="銷售.$B$2:.$B$3" chart:label-cell-address="銷售.$B$1"/>
          <chart:series chart:values-cell-range-address="銷售.$C$2:.$C$3" table:cell-range-address="銷售.$C$2:.$C$3" chart:label-cell-address="銷售.$C$1"/>
          <chart:series chart:values-cell-range-address="銷售.$D$2:.$D$3" table:cell-range-address="銷售.$D$2:.$D$3" chart:label-cell-address="銷售.$D$1"/>
        </chart:plot-area>
        <chart:title>
          <text:p>毛利趨勢</text:p>
        </chart:title>
      </chart:chart>
    </office:chart>
  </office:body>
</office:document-content>
</file>

<file path=Object 1/meta.xml><?xml version="1.0" encoding="utf-8"?>
<office:document-meta xmlns:office="urn:oasis:names:tc:opendocument:xmlns:office:1.0" xmlns:meta="urn:oasis:names:tc:opendocument:xmlns:meta:1.0" office:version="1.4">
  <office:meta>
    <meta:document-statistic meta:word-count="1" meta:character-count="4" meta:paragraph-count="1" meta:table-count="0" meta:image-count="0" meta:page-count="1"/>
  </office:meta>
</office:document-meta>
</file>

<file path=Object 1/styles.xml><?xml version="1.0" encoding="utf-8"?>
<office:document-styles xmlns:office="urn:oasis:names:tc:opendocument:xmlns:office:1.0" office:version="1.4">
  <office:styles/>
</office:document-styles>
</file>