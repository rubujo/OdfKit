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 manifest:version="1.4"/>
  <manifest:file-entry manifest:full-path="META-INF/" manifest:media-type=""/>
  <manifest:file-entry manifest:full-path="Object 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mimetype" manifest:media-type="text/plain"/>
  <manifest:file-entry manifest:full-path="Object 1/settings.xml" manifest:media-type="text/xml"/>
  <manifest:file-entry manifest:full-path="Object 1/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table="urn:oasis:names:tc:opendocument:xmlns:table:1.0" xmlns:of="urn:oasis:names:tc:opendocument:xmlns:of:1.2" xmlns:text="urn:oasis:names:tc:opendocument:xmlns:text:1.0" xmlns:draw="urn:oasis:names:tc:opendocument:xmlns:drawing:1.0" xmlns:svg="urn:oasis:names:tc:opendocument:xmlns:svg-compatible:1.0" xmlns:xlink="http://www.w3.org/1999/xlink" office:version="1.4">
  <office:automatic-styles>
    <style:style style:family="table-column" style:name="co1">
      <style:table-column-properties style:column-width="2.8cm"/>
    </style:style>
    <style:style style:family="table-column" style:name="co2">
      <style:table-column-properties style:column-width="2.2cm"/>
    </style:style>
    <style:style style:family="table-cell" style:name="ce1">
      <style:table-cell-properties fo:background-color="#D9EAF7"/>
    </style:style>
    <style:style style:family="table-cell" style:name="ce2">
      <style:table-cell-properties fo:background-color="#D9EAF7"/>
      <style:text-properties fo:color="#111111"/>
    </style:style>
    <style:style style:family="table-cell" style:name="ce3">
      <style:table-cell-properties fo:background-color="#D9EAF7"/>
      <style:text-properties fo:color="#111111" fo:font-weight="bold"/>
    </style:style>
    <style:style style:family="table-cell" style:name="ce4">
      <style:text-properties fo:color="#222222"/>
    </style:style>
    <style:style style:family="table-cell" style:name="ce5">
      <style:text-properties fo:color="#222222" fo:font-size="11pt"/>
    </style:style>
  </office:automatic-styles>
  <office:body>
    <office:spreadsheet>
      <table:content-validations>
        <table:content-validation table:name="val_1" table:allow-empty-cell="true" table:base-cell-address="銷售.A1" table:condition="of:cell-content-is-decimal-number() and cell-content-is-between(0,1000)">
          <table:error-message table:title="輸入範圍" table:message-type="stop">
            <text:p>請輸入 0 到 1000 之間的數值。</text:p>
          </table:error-message>
        </table:content-validation>
      </table:content-validations>
      <table:table table:name="銷售">
        <table:shapes>
          <draw:frame draw:z-index="0" svg:width="12cm" svg:height="7cm" svg:x="1cm" svg:y="1cm">
            <draw:object xlink:href="./Object 1" xlink:type="simple" xlink:show="embed" xlink:actuate="onLoad"/>
          </draw:frame>
        </table:shapes>
        <table:table-column table:style-name="co1"/>
        <table:table-column table:style-name="co2"/>
        <table:table-column table:style-name="co2"/>
        <table:table-column table:style-name="co2"/>
        <table:table-row>
          <table:table-cell office:value-type="string" table:style-name="ce3">
            <text:p>月份</text:p>
          </table:table-cell>
          <table:table-cell office:value-type="string" table:style-name="ce3">
            <text:p>營收</text:p>
          </table:table-cell>
          <table:table-cell office:value-type="string" table:style-name="ce3">
            <text:p>成本</text:p>
          </table:table-cell>
          <table:table-cell office:value-type="string" table:style-name="ce3">
            <text:p>毛利</text:p>
          </table:table-cell>
        </table:table-row>
        <table:table-row>
          <table:table-cell office:value-type="string" table:style-name="ce5">
            <text:p>一月</text:p>
          </table:table-cell>
          <table:table-cell office:value-type="float" office:value="120" table:style-name="ce5" table:content-validation-name="val_1">
            <text:p>120</text:p>
          </table:table-cell>
          <table:table-cell office:value-type="float" office:value="72" table:style-name="ce5" table:content-validation-name="val_1">
            <text:p>72</text:p>
          </table:table-cell>
          <table:table-cell table:formula="of:=[.B2]-[.C2]" office:value-type="float" office:value="48" table:style-name="ce5">
            <text:p>48</text:p>
          </table:table-cell>
        </table:table-row>
        <table:table-row>
          <table:table-cell office:value-type="string" table:style-name="ce5">
            <text:p>二月</text:p>
          </table:table-cell>
          <table:table-cell office:value-type="float" office:value="148" table:style-name="ce5" table:content-validation-name="val_1">
            <text:p>148</text:p>
          </table:table-cell>
          <table:table-cell office:value-type="float" office:value="83" table:style-name="ce5" table:content-validation-name="val_1">
            <text:p>83</text:p>
          </table:table-cell>
          <table:table-cell table:formula="of:=[.B3]-[.C3]" office:value-type="float" office:value="65" table:style-name="ce5">
            <text:p>65</text:p>
          </table:table-cell>
        </table:table-row>
        <table:named-expressions>
          <table:named-range table:name="SalesModel" table:cell-range-address="銷售.A1:.D3"/>
        </table:named-expressions>
      </table:table>
      <table:table table:name="摘要">
        <table:table-column/>
        <table:table-row>
          <table:table-cell table:formula="of:='銷售'.D2" office:value-type="float" office:value="48" table:style-name="ce5">
            <text:p>48</text:p>
          </table:table-cell>
        </table:table-row>
      </table:table>
      <table:data-pilot-tables>
        <table:data-pilot-table table:name="SalesPivot" table:target-range-address="銷售.G1:.G1" table:buttons="銷售.G1:.G1">
          <table:source-cell-range table:cell-range-address="銷售.A1:.D3"/>
          <table:data-pilot-field table:source-field-name="月份" table:orientation="row"/>
          <table:data-pilot-field table:source-field-name="毛利" table:orientation="data" table:function="sum"/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財務模型</dc:title>
    <dc:creator>OdfKit</dc:creator>
    <meta:document-statistic meta:word-count="18" meta:character-count="47" meta:paragraph-count="14" meta:table-count="2" meta:image-count="0" meta:page-count="1"/>
  </office:meta>
</office:document-meta>
</file>

<file path=Object 1/content.xml><?xml version="1.0" encoding="utf-8"?>
<office:document-content xmlns:office="urn:oasis:names:tc:opendocument:xmlns:office:1.0" xmlns:chart="urn:oasis:names:tc:opendocument:xmlns:chart:1.0" xmlns:table="urn:oasis:names:tc:opendocument:xmlns:table:1.0" xmlns:text="urn:oasis:names:tc:opendocument:xmlns:text:1.0" office:version="1.4">
  <office:body>
    <office:chart>
      <chart:chart chart:class="chart:line" table:cell-range-address="銷售.$A$1:.$D$3">
        <chart:plot-area chart:data-source-has-labels="both">
          <chart:axis chart:dimension="x">
            <chart:categories table:cell-range-address="銷售.$A$2:.$A$3"/>
          </chart:axis>
          <chart:series chart:values-cell-range-address="銷售.$B$2:.$B$3" table:cell-range-address="銷售.$B$2:.$B$3" chart:label-cell-address="銷售.$B$1"/>
          <chart:series chart:values-cell-range-address="銷售.$C$2:.$C$3" table:cell-range-address="銷售.$C$2:.$C$3" chart:label-cell-address="銷售.$C$1"/>
          <chart:series chart:values-cell-range-address="銷售.$D$2:.$D$3" table:cell-range-address="銷售.$D$2:.$D$3" chart:label-cell-address="銷售.$D$1"/>
        </chart:plot-area>
        <chart:title>
          <text:p>毛利趨勢</text:p>
        </chart:title>
      </chart:chart>
    </office:chart>
  </office:body>
</office:document-content>
</file>

<file path=Object 1/meta.xml><?xml version="1.0" encoding="utf-8"?>
<office:document-meta xmlns:office="urn:oasis:names:tc:opendocument:xmlns:office:1.0" xmlns:meta="urn:oasis:names:tc:opendocument:xmlns:meta:1.0" office:version="1.4">
  <office:meta>
    <meta:document-statistic meta:word-count="1" meta:character-count="4" meta:paragraph-count="1" meta:table-count="0" meta:image-count="0" meta:page-count="1"/>
  </office:meta>
</office:document-meta>
</file>

<file path=Object 1/styles.xml><?xml version="1.0" encoding="utf-8"?>
<office:document-styles xmlns:office="urn:oasis:names:tc:opendocument:xmlns:office:1.0" office:version="1.4">
  <office:styles/>
</office:document-styles>
</file>