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 manifest:version="1.4"/>
  <manifest:file-entry manifest:full-path="Object 1/" manifest:media-type="application/vnd.oasis.opendocument.chart"/>
  <manifest:file-entry manifest:full-path="Object 1/content.xml" manifest:media-type="text/xml"/>
  <manifest:file-entry manifest:full-path="Object 1/mimetype" manifest:media-type=""/>
  <manifest:file-entry manifest:full-path="Object 1/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fo="urn:oasis:names:tc:opendocument:xmlns:xsl-fo-compatible:1.0" xmlns:text="urn:oasis:names:tc:opendocument:xmlns:text:1.0" xmlns:xlink="http://www.w3.org/1999/xlink" xmlns:dc="http://purl.org/dc/elements/1.1/" xmlns:table="urn:oasis:names:tc:opendocument:xmlns:table:1.0" xmlns:draw="urn:oasis:names:tc:opendocument:xmlns:drawing:1.0" xmlns:svg="urn:oasis:names:tc:opendocument:xmlns:svg-compatible:1.0" office:version="1.4">
  <office:automatic-styles>
    <style:style style:family="text" style:name="T1">
      <style:text-properties fo:font-weight="bold"/>
    </style:style>
    <style:style style:family="text" style:name="T2">
      <style:text-properties fo:font-weight="bold" fo:color="#0066CC"/>
    </style:style>
    <style:style style:family="section" style:name="S1">
      <style:section-properties fo:column-count="2"/>
    </style:style>
    <style:style style:family="section" style:name="S2">
      <style:section-properties fo:column-count="2" fo:column-gap="0.5cm"/>
    </style:style>
  </office:automatic-styles>
  <office:body>
    <office:text>
      <text:h text:outline-level="1"><text:reference-mark text:name="_Toc_1792e6a4"/>年度報告</text:h>
      <text:table-of-content text:name="目錄">
        <text:table-of-content-source text:outline-level="2">
          <text:table-of-content-entry-template text:outline-level="1" text:style-name="Contents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Heading">目錄</text:p>
          <text:p text:style-name="Contents_1"><text:a xlink:href="#_Toc_1792e6a4" xlink:type="simple">年度報告<text:tab/>1</text:a></text:p>
        </text:index-body>
      </text:table-of-content>
      <text:h text:outline-level="2">營運摘要</text:h>
      <text:p><text:span>營收年增 </text:span><text:span text:style-name="T2">18%</text:span><text:span>。</text:span><text:note text:note-class="footnote" text:id="ftn0"><text:note-citation>1</text:note-citation><text:note-body><text:p>示範資料，非實際財務數字。</text:p></text:note-body></text:note><office:annotation office:name="9cf65812fe82414b9ec674234785cfc5"><dc:creator>reviewer</dc:creator><dc:date>2026-06-27T22:38:19Z</dc:date><text:p>請財務團隊確認最終數字。</text:p></office:annotation></text:p>
      <table:table table:summary="季度營收摘要">
        <table:table-row>
          <table:table-cell>
            <text:p><text:span>季度</text:span></text:p>
          </table:table-cell>
          <table:table-cell>
            <text:p><text:span>營收</text:span></text:p>
          </table:table-cell>
        </table:table-row>
        <table:table-row>
          <table:table-cell>
            <text:p><text:span>Q1</text:span></text:p>
          </table:table-cell>
          <table:table-cell>
            <text:p><text:span>120</text:span></text:p>
          </table:table-cell>
        </table:table-row>
        <table:table-row>
          <table:table-cell>
            <text:p><text:span>Q2</text:span></text:p>
          </table:table-cell>
          <table:table-cell>
            <text:p><text:span>148</text:span></text:p>
          </table:table-cell>
        </table:table-row>
      </table:table>
      <text:section text:name="ExecutiveSection" text:style-name="S2" text:protected="true">
        <text:p>本區段使用雙欄版面呈現重點。</text:p>
      </text:section>
      <text:p><text:span>圖表摘要</text:span><draw:frame text:anchor-type="paragraph" svg:width="8cm" svg:height="5cm"><draw:object xlink:href=".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office:version="1.4">
  <office:styles/>
  <office:automatic-styles/>
  <office:master-styles>
    <style:master-page style:name="Standard" style:page-layout-name="Mpm1">
      <style:header>
        <text:p>年度報告</text:p>
      </style:header>
      <style:footer>
        <text:p><text:span>第 </text:span><text:page-number text:select-page="current"/><text:span> 頁，共 </text:span><text:page-count style:num-format="1"/><text:span> 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4">
  <office:meta>
    <dc:title>年度報告</dc:title>
    <dc:creator>OdfKit</dc:creator>
    <meta:document-statistic meta:word-count="21" meta:character-count="110" meta:paragraph-count="13" meta:table-count="1" meta:image-count="0" meta:page-count="1"/>
  </office:meta>
</office:document-meta>
</file>

<file path=Object 1/content.xml><?xml version="1.0" encoding="utf-8"?>
<office:document-content xmlns:office="urn:oasis:names:tc:opendocument:xmlns:office:1.0" xmlns:chart="urn:oasis:names:tc:opendocument:xmlns:chart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office:version="1.3">
  <office:body>
    <office:chart>
      <chart:chart chart:class="chart:bar" table:cell-range-address="Data.A1:.B3" chart:legend-position="end">
        <chart:title>
          <text:p>季度營收</text:p>
        </chart:title>
        <chart:plot-area chart:data-source-has-labels="both">
          <chart:series chart:class="chart:bar" chart:label-cell-address="Data.B1" chart:values-cell-range-address="Data.B2:Data.B3">
            <chart:domain table:cell-range-address="Data.A2:Data.A3"/>
          </chart:series>
          <chart:axis chart:dimension="x" chart:name="primary-x"/>
          <chart:axis chart:dimension="y" chart:name="primary-y"/>
        </chart:plot-area>
        <chart:legend chart:legend-position="end"/>
        <table:table table:name="LocalTable">
          <table:table-row>
            <table:table-cell office:value-type="float" office:value="10.0">
              <text:p>10.0</text:p>
            </table:table-cell>
            <table:table-cell office:value-type="float" office:value="10.0">
              <text:p>10.0</text:p>
            </table:table-cell>
          </table:table-row>
          <table:table-row>
            <table:table-cell office:value-type="float" office:value="10.0">
              <text:p>10.0</text:p>
            </table:table-cell>
            <table:table-cell office:value-type="float" office:value="10.0">
              <text:p>10.0</text:p>
            </table:table-cell>
          </table:table-row>
          <table:table-row>
            <table:table-cell office:value-type="float" office:value="10.0">
              <text:p>10.0</text:p>
            </table:table-cell>
            <table:table-cell office:value-type="float" office:value="10.0">
              <text:p>10.0</text:p>
            </table:table-cell>
          </table:table-row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office:version="1.3">
  <office:styles/>
  <office:automatic-styles/>
  <office:master-styles/>
</office:document-styles>
</file>