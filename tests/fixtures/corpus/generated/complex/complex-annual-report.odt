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text" manifest:version="1.4"/>
  <manifest:file-entry manifest:full-path="Object 1/" manifest:media-type="application/vnd.oasis.opendocument.chart"/>
  <manifest:file-entry manifest:full-path="Object 1/content.xml" manifest:media-type="text/xml"/>
  <manifest:file-entry manifest:full-path="Object 1/mimetype" manifest:media-type="text/plain"/>
  <manifest:file-entry manifest:full-path="Object 1/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fo="urn:oasis:names:tc:opendocument:xmlns:xsl-fo-compatible:1.0" xmlns:text="urn:oasis:names:tc:opendocument:xmlns:text:1.0" xmlns:dc="http://purl.org/dc/elements/1.1/" xmlns:table="urn:oasis:names:tc:opendocument:xmlns:table:1.0" xmlns:draw="urn:oasis:names:tc:opendocument:xmlns:drawing:1.0" xmlns:svg="urn:oasis:names:tc:opendocument:xmlns:svg-compatible:1.0" xmlns:xlink="http://www.w3.org/1999/xlink" office:version="1.4">
  <office:automatic-styles>
    <style:style style:family="paragraph" style:name="P1">
      <style:paragraph-properties fo:text-align="center"/>
    </style:style>
    <style:style style:family="paragraph" style:name="P2">
      <style:paragraph-properties fo:text-align="center"/>
      <style:text-properties fo:font-size="28pt"/>
    </style:style>
    <style:style style:family="paragraph" style:name="P3">
      <style:paragraph-properties fo:text-align="center"/>
      <style:text-properties fo:font-size="28pt" style:font-size-asian="28pt"/>
    </style:style>
    <style:style style:family="paragraph" style:name="P4">
      <style:paragraph-properties fo:text-align="center"/>
      <style:text-properties fo:font-size="28pt" style:font-size-asian="28pt" style:font-size-complex="28pt"/>
    </style:style>
    <style:style style:family="paragraph" style:name="P5">
      <style:paragraph-properties fo:text-align="center"/>
      <style:text-properties fo:font-size="28pt" style:font-size-asian="28pt" style:font-size-complex="28pt" fo:font-weight="bold"/>
    </style:style>
    <style:style style:family="paragraph" style:name="P6">
      <style:paragraph-properties fo:text-align="center" fo:margin-top="6cm"/>
      <style:text-properties fo:font-size="28pt" style:font-size-asian="28pt" style:font-size-complex="28pt" fo:font-weight="bold"/>
    </style:style>
    <style:style style:family="paragraph" style:name="P7">
      <style:paragraph-properties fo:text-align="center" fo:margin-top="6cm" fo:margin-bottom="0.6cm"/>
      <style:text-properties fo:font-size="28pt" style:font-size-asian="28pt" style:font-size-complex="28pt" fo:font-weight="bold"/>
    </style:style>
    <style:style style:family="paragraph" style:name="P8">
      <style:paragraph-properties fo:text-align="center"/>
      <style:text-properties fo:font-size="16pt"/>
    </style:style>
    <style:style style:family="paragraph" style:name="P9">
      <style:paragraph-properties fo:text-align="center"/>
      <style:text-properties fo:font-size="16pt" style:font-size-asian="16pt"/>
    </style:style>
    <style:style style:family="paragraph" style:name="P10">
      <style:paragraph-properties fo:text-align="center"/>
      <style:text-properties fo:font-size="16pt" style:font-size-asian="16pt" style:font-size-complex="16pt"/>
    </style:style>
    <style:style style:family="paragraph" style:name="P11">
      <style:paragraph-properties fo:text-align="center"/>
      <style:text-properties fo:font-size="16pt" style:font-size-asian="16pt" style:font-size-complex="16pt" fo:font-weight="normal"/>
    </style:style>
    <style:style style:family="paragraph" style:name="P12">
      <style:paragraph-properties fo:text-align="center" fo:margin-top="0cm"/>
      <style:text-properties fo:font-size="16pt" style:font-size-asian="16pt" style:font-size-complex="16pt" fo:font-weight="normal"/>
    </style:style>
    <style:style style:family="paragraph" style:name="P13">
      <style:paragraph-properties fo:text-align="center" fo:margin-top="0cm" fo:margin-bottom="1.4cm"/>
      <style:text-properties fo:font-size="16pt" style:font-size-asian="16pt" style:font-size-complex="16pt" fo:font-weight="normal"/>
    </style:style>
    <style:style style:family="paragraph" style:name="P14">
      <style:paragraph-properties fo:text-align="center"/>
      <style:text-properties fo:font-size="12pt"/>
    </style:style>
    <style:style style:family="paragraph" style:name="P15">
      <style:paragraph-properties fo:text-align="center"/>
      <style:text-properties fo:font-size="12pt" style:font-size-asian="12pt"/>
    </style:style>
    <style:style style:family="paragraph" style:name="P16">
      <style:paragraph-properties fo:text-align="center"/>
      <style:text-properties fo:font-size="12pt" style:font-size-asian="12pt" style:font-size-complex="12pt"/>
    </style:style>
    <style:style style:family="paragraph" style:name="P17">
      <style:paragraph-properties fo:text-align="center"/>
      <style:text-properties fo:font-size="12pt" style:font-size-asian="12pt" style:font-size-complex="12pt" fo:font-weight="normal"/>
    </style:style>
    <style:style style:family="paragraph" style:name="P18">
      <style:paragraph-properties fo:text-align="center" fo:margin-top="0cm"/>
      <style:text-properties fo:font-size="12pt" style:font-size-asian="12pt" style:font-size-complex="12pt" fo:font-weight="normal"/>
    </style:style>
    <style:style style:family="paragraph" style:name="P19">
      <style:paragraph-properties fo:text-align="center" fo:margin-top="0cm" fo:margin-bottom="0.2cm"/>
      <style:text-properties fo:font-size="12pt" style:font-size-asian="12pt" style:font-size-complex="12pt" fo:font-weight="normal"/>
    </style:style>
    <style:style style:family="paragraph" style:name="P20">
      <style:paragraph-properties fo:text-align="center" fo:margin-top="0cm" fo:margin-bottom="0cm"/>
      <style:text-properties fo:font-size="12pt" style:font-size-asian="12pt" style:font-size-complex="12pt" fo:font-weight="normal"/>
    </style:style>
    <style:style style:family="paragraph" style:name="P21">
      <style:paragraph-properties fo:text-align="center" fo:margin-top="0cm" fo:margin-bottom="0cm" fo:break-after="page"/>
      <style:text-properties fo:font-size="12pt" style:font-size-asian="12pt" style:font-size-complex="12pt" fo:font-weight="normal"/>
    </style:style>
    <style:style style:family="paragraph" style:name="P22">
      <style:text-properties fo:font-size="18pt"/>
    </style:style>
    <style:style style:family="paragraph" style:name="P23">
      <style:text-properties fo:font-size="18pt" style:font-size-asian="18pt"/>
    </style:style>
    <style:style style:family="paragraph" style:name="P24">
      <style:text-properties fo:font-size="18pt" style:font-size-asian="18pt" style:font-size-complex="18pt"/>
    </style:style>
    <style:style style:family="paragraph" style:name="P25">
      <style:text-properties fo:font-size="18pt" style:font-size-asian="18pt" style:font-size-complex="18pt" fo:color="#1F4E79"/>
    </style:style>
    <style:style style:family="paragraph" style:name="P26">
      <style:text-properties fo:font-size="11pt"/>
    </style:style>
    <style:style style:family="paragraph" style:name="P27">
      <style:text-properties fo:font-size="11pt" style:font-size-asian="11pt"/>
    </style:style>
    <style:style style:family="paragraph" style:name="P28">
      <style:text-properties fo:font-size="11pt" style:font-size-asian="11pt" style:font-size-complex="11pt"/>
    </style:style>
    <style:style style:family="paragraph" style:name="P29">
      <style:text-properties fo:font-size="11pt" style:font-size-asian="11pt" style:font-size-complex="11pt" fo:color="#222222"/>
    </style:style>
    <style:style style:family="text" style:name="T1">
      <style:text-properties fo:font-weight="bold"/>
    </style:style>
    <style:style style:family="text" style:name="T2">
      <style:text-properties fo:font-weight="bold" fo:color="#0066CC"/>
    </style:style>
    <style:style style:family="text" style:name="T3">
      <style:text-properties fo:font-weight="bold" fo:color="#0066CC" fo:background-color="#FFF2CC"/>
    </style:style>
    <style:style style:family="section" style:name="S1">
      <style:section-properties>
        <style:columns fo:column-count="2" fo:column-gap="0.5cm"/>
      </style:section-properties>
    </style:style>
    <style:style style:family="table-cell" style:name="ce1">
      <style:table-cell-properties fo:background-color="#D9EAF7"/>
    </style:style>
    <style:style style:family="table-cell" style:name="ce2">
      <style:table-cell-properties fo:background-color="#D9EAF7"/>
      <style:text-properties fo:color="#111111"/>
    </style:style>
    <style:style style:family="table-cell" style:name="ce3">
      <style:table-cell-properties fo:background-color="#D9EAF7"/>
      <style:text-properties fo:color="#111111" fo:font-weight="bold"/>
    </style:style>
  </office:automatic-styles>
  <office:body>
    <office:text>
      <text:h text:outline-level="1" text:style-name="P7">年度報告</text:h>
      <text:p text:style-name="P13">2026 年營運成果</text:p>
      <text:p text:style-name="P19">OdfKit</text:p>
      <text:p text:style-name="P21">2026 年</text:p>
      <text:table-of-content text:name="目錄">
        <text:table-of-content-source text:outline-level="2">
          <text:table-of-content-entry-template text:outline-level="1" text:style-name="Contents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Heading">目錄</text:p>
          <text:p text:style-name="Contents_1">年度報告<text:tab/>1</text:p>
        </text:index-body>
      </text:table-of-content>
      <text:h text:outline-level="2" text:style-name="P25">營運摘要</text:h>
      <text:p text:style-name="P29"><text:span>營收年增 </text:span><text:span text:style-name="T3">18%</text:span><text:span>。</text:span><text:note text:note-class="footnote" text:id="ftn0"><text:note-citation>1</text:note-citation><text:note-body><text:p>示範資料，非實際財務數字。</text:p></text:note-body></text:note><office:annotation office:name="51af95ba748b457582076df87b622ec9"><dc:creator>reviewer</dc:creator><dc:date>2026-06-30T05:43:59Z</dc:date><text:p>請財務團隊確認最終數字。</text:p></office:annotation></text:p>
      <text:section text:name="ExecutiveSection" text:style-name="S1">
        <text:h text:outline-level="3">區段摘要</text:h>
        <text:p>此區段使用多欄版面，驗證 text:section 與 style:columns 產物。</text:p>
        <text:p>第二欄內容保留一般段落與文字片段，避免下沉 DOM 操作。</text:p>
      </text:section>
      <table:table table:name="Table1">
        <table:table-column/>
        <table:table-column/>
        <table:table-row>
          <table:table-cell table:style-name="ce3">
            <text:p><text:span>季度</text:span></text:p>
          </table:table-cell>
          <table:table-cell table:style-name="ce3">
            <text:p><text:span>營收</text:span></text:p>
          </table:table-cell>
        </table:table-row>
        <table:table-row>
          <table:table-cell>
            <text:p><text:span>Q1</text:span></text:p>
          </table:table-cell>
          <table:table-cell>
            <text:p><text:span>120</text:span></text:p>
          </table:table-cell>
        </table:table-row>
        <table:table-row>
          <table:table-cell>
            <text:p><text:span>Q2</text:span></text:p>
          </table:table-cell>
          <table:table-cell>
            <text:p><text:span>148</text:span></text:p>
          </table:table-cell>
        </table:table-row>
      </table:table>
      <text:p text:style-name="P29">本段落示範報告本文與表格後續說明。</text:p>
      <text:p text:style-name="P29"><text:span>圖表摘要</text:span><draw:frame text:anchor-type="paragraph" svg:width="8cm" svg:height="5cm"><draw:object xlink:href=".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office:version="1.4">
  <office:styles/>
  <office:automatic-styles/>
  <office:master-styles>
    <style:master-page style:name="Standard" style:page-layout-name="Mpm1">
      <style:header>
        <text:p>年度報告</text:p>
      </style:head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4">
  <office:meta>
    <dc:title>年度報告</dc:title>
    <dc:creator>OdfKit</dc:creator>
    <meta:document-statistic meta:word-count="35" meta:character-count="213" meta:paragraph-count="18" meta:table-count="1" meta:image-count="0" meta:page-count="1"/>
  </office:meta>
</office:document-meta>
</file>

<file path=Object 1/content.xml><?xml version="1.0" encoding="utf-8"?>
<office:document-content xmlns:office="urn:oasis:names:tc:opendocument:xmlns:office:1.0" xmlns:chart="urn:oasis:names:tc:opendocument:xmlns:chart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office:version="1.3">
  <office:body>
    <office:chart>
      <chart:chart chart:class="chart:bar" table:cell-range-address="Data.A1:.B3" chart:legend-position="end">
        <chart:title>
          <text:p>季度營收</text:p>
        </chart:title>
        <chart:plot-area chart:data-source-has-labels="both">
          <chart:series chart:class="chart:bar" chart:label-cell-address="Data.B1" chart:values-cell-range-address="Data.B2:Data.B3">
            <chart:domain table:cell-range-address="Data.A2:Data.A3"/>
          </chart:series>
          <chart:axis chart:dimension="x" chart:name="primary-x"/>
          <chart:axis chart:dimension="y" chart:name="primary-y"/>
        </chart:plot-area>
        <chart:legend chart:legend-position="end"/>
        <table:table table:name="LocalTable">
          <table:table-row>
            <table:table-cell office:value-type="float" office:value="10.0">
              <text:p>10.0</text:p>
            </table:table-cell>
            <table:table-cell office:value-type="float" office:value="10.0">
              <text:p>10.0</text:p>
            </table:table-cell>
          </table:table-row>
          <table:table-row>
            <table:table-cell office:value-type="float" office:value="10.0">
              <text:p>10.0</text:p>
            </table:table-cell>
            <table:table-cell office:value-type="float" office:value="10.0">
              <text:p>10.0</text:p>
            </table:table-cell>
          </table:table-row>
          <table:table-row>
            <table:table-cell office:value-type="float" office:value="10.0">
              <text:p>10.0</text:p>
            </table:table-cell>
            <table:table-cell office:value-type="float" office:value="10.0">
              <text:p>10.0</text:p>
            </table:table-cell>
          </table:table-row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office:version="1.3">
  <office:styles/>
  <office:automatic-styles/>
  <office:master-styles/>
</office:document-styles>
</file>