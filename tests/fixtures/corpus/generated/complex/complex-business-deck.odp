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presentation" manifest:version="1.4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svg="urn:oasis:names:tc:opendocument:xmlns:svg-compatible:1.0" xmlns:text="urn:oasis:names:tc:opendocument:xmlns:text:1.0" office:version="1.4">
  <office:body>
    <office:presentation>
      <draw:page draw:name="Summary" draw:master-page-name="Default">
        <draw:frame draw:id="frm_8f948422" xml:id="frm_8f948422" svg:x="1cm" svg:y="1cm" svg:width="10cm" svg:height="2cm">
          <draw:text-box>
            <text:p>營運摘要</text:p>
          </draw:text-box>
        </draw:frame>
        <draw:frame draw:id="frm_c284e595" xml:id="frm_c284e595" svg:x="72cm" svg:y="130cm" svg:width="520cm" svg:height="80cm">
          <draw:text-box>
            <text:p>以一致 builder 語彙建立簡報內容。</text:p>
          </draw:text-box>
        </draw:frame>
      </draw:page>
      <draw:page draw:name="Detail" draw:master-page-name="Default">
        <draw:frame draw:id="frm_479fd5c4" xml:id="frm_479fd5c4" svg:x="1cm" svg:y="1cm" svg:width="10cm" svg:height="2cm">
          <draw:text-box>
            <text:p>三項重點</text:p>
          </draw:text-box>
        </draw:frame>
        <draw:frame draw:id="frm_118c3217" xml:id="frm_118c3217" svg:x="72cm" svg:y="130cm" svg:width="520cm" svg:height="80cm">
          <draw:text-box>
            <text:p>市場、產品、營運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4">
  <office:meta>
    <dc:title>Builder corpus deck</dc:title>
    <dc:creator>OdfKit</dc:creator>
    <meta:document-statistic meta:word-count="6" meta:character-count="37" meta:paragraph-count="4" meta:table-count="0" meta:image-count="0" meta:page-count="1"/>
  </office:meta>
</office:document-meta>
</file>