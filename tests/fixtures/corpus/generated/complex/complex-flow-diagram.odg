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graphics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draw="urn:oasis:names:tc:opendocument:xmlns:drawing:1.0" xmlns:svg="urn:oasis:names:tc:opendocument:xmlns:svg-compatible:1.0" xmlns:text="urn:oasis:names:tc:opendocument:xmlns:text:1.0" office:version="1.4">
  <office:automatic-styles>
    <style:style style:family="graphic" style:name="gr1">
      <style:graphic-properties draw:fill="solid"/>
    </style:style>
    <style:style style:family="graphic" style:name="gr2">
      <style:graphic-properties draw:fill="solid" draw:fill-color="#D9EAF7"/>
    </style:style>
    <style:style style:family="graphic" style:name="gr3">
      <style:graphic-properties draw:fill="solid" draw:fill-color="#D9EAF7" draw:stroke="solid"/>
    </style:style>
    <style:style style:family="graphic" style:name="gr4">
      <style:graphic-properties draw:fill="solid" draw:fill-color="#D9EAF7" draw:stroke="solid" svg:stroke-color="#1F4E79"/>
    </style:style>
    <style:style style:family="graphic" style:name="gr5">
      <style:graphic-properties draw:fill="solid" draw:fill-color="#FFF2CC"/>
    </style:style>
    <style:style style:family="graphic" style:name="gr6">
      <style:graphic-properties draw:fill="solid" draw:fill-color="#FFF2CC" draw:stroke="solid"/>
    </style:style>
    <style:style style:family="graphic" style:name="gr7">
      <style:graphic-properties draw:fill="solid" draw:fill-color="#FFF2CC" draw:stroke="solid" svg:stroke-color="#1F4E79"/>
    </style:style>
    <style:style style:family="graphic" style:name="gr8">
      <style:graphic-properties draw:fill="solid" draw:fill-color="#D9EAD3"/>
    </style:style>
    <style:style style:family="graphic" style:name="gr9">
      <style:graphic-properties draw:fill="solid" draw:fill-color="#D9EAD3" draw:stroke="solid"/>
    </style:style>
    <style:style style:family="graphic" style:name="gr10">
      <style:graphic-properties draw:fill="solid" draw:fill-color="#D9EAD3" draw:stroke="solid" svg:stroke-color="#1F4E79"/>
    </style:style>
    <style:style style:family="graphic" style:name="gr11">
      <style:graphic-properties draw:stroke="solid"/>
    </style:style>
    <style:style style:family="graphic" style:name="gr12">
      <style:graphic-properties draw:stroke="solid" svg:stroke-color="#1F4E79"/>
    </style:style>
  </office:automatic-styles>
  <office:body>
    <office:drawing>
      <draw:page draw:name="主流程" draw:master-page-name="Default" draw:style-name="dp1">
        <draw:rect draw:id="load" xml:id="load" svg:x="1cm" svg:y="1cm" svg:width="4cm" svg:height="1.4cm" draw:style-name="gr4"/>
        <draw:frame draw:id="frm_eb59a822" xml:id="frm_eb59a822" svg:x="1.3cm" svg:y="1.25cm" svg:width="3.4cm" svg:height="0.8999999999999999cm">
          <draw:text-box>
            <text:p>載入 ODF</text:p>
          </draw:text-box>
        </draw:frame>
        <draw:ellipse draw:id="validate" xml:id="validate" svg:x="7cm" svg:y="1cm" svg:width="4cm" svg:height="1.4cm" draw:style-name="gr7"/>
        <draw:frame draw:id="frm_01e325de" xml:id="frm_01e325de" svg:x="7.3cm" svg:y="1.25cm" svg:width="3.4cm" svg:height="0.8999999999999999cm">
          <draw:text-box>
            <text:p>驗證封裝</text:p>
          </draw:text-box>
        </draw:frame>
        <draw:rect draw:id="export" xml:id="export" svg:x="13cm" svg:y="1cm" svg:width="4cm" svg:height="1.4cm" draw:style-name="gr10"/>
        <draw:frame draw:id="frm_cc320cf7" xml:id="frm_cc320cf7" svg:x="13.3cm" svg:y="1.25cm" svg:width="3.4cm" svg:height="0.8999999999999999cm">
          <draw:text-box>
            <text:p>輸出報告</text:p>
          </draw:text-box>
        </draw:frame>
        <draw:connector draw:id="shp_4ab5cc2d" xml:id="shp_4ab5cc2d" svg:x1="85.0393701pt" svg:y1="48.18897639pt" svg:x2="255.1181103pt" svg:y2="48.18897639pt" svg:viewBox="0 0 1000 1000" draw:start-shape="load" draw:end-shape="validate" draw:type="line" draw:style-name="gr12"/>
        <draw:connector draw:id="shp_0b75a3fd" xml:id="shp_0b75a3fd" svg:x1="255.1181103pt" svg:y1="48.18897639pt" svg:x2="425.19685050000004pt" svg:y2="48.18897639pt" svg:viewBox="0 0 1000 1000" draw:start-shape="validate" draw:end-shape="export" draw:type="line" draw:style-name="gr12"/>
        <draw:frame draw:id="frm_7cbb43c8" xml:id="frm_7cbb43c8" svg:x="13cm" svg:y="4cm" svg:width="4cm" svg:height="1cm">
          <draw:text-box>
            <text:p>完成節點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匯入流程</dc:title>
    <meta:document-statistic meta:word-count="5" meta:character-count="18" meta:paragraph-count="4" meta:table-count="0" meta:image-count="0" meta:page-count="1"/>
  </office:meta>
</office:document-meta>
</file>