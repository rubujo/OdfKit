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graphics" manifest:version="1.4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draw="urn:oasis:names:tc:opendocument:xmlns:drawing:1.0" xmlns:svg="urn:oasis:names:tc:opendocument:xmlns:svg-compatible:1.0" xmlns:text="urn:oasis:names:tc:opendocument:xmlns:text:1.0" office:version="1.4">
  <office:automatic-styles>
    <style:style style:family="graphic" style:name="gr1">
      <style:graphic-properties draw:fill="solid"/>
    </style:style>
    <style:style style:family="graphic" style:name="gr2">
      <style:graphic-properties draw:fill="solid" draw:fill-color="#cfe2f3"/>
    </style:style>
    <style:style style:family="graphic" style:name="gr3">
      <style:graphic-properties draw:fill="solid" draw:fill-color="#cfe2f3" draw:stroke="solid"/>
    </style:style>
    <style:style style:family="graphic" style:name="gr4">
      <style:graphic-properties draw:fill="solid" draw:fill-color="#cfe2f3" draw:stroke="solid" svg:stroke-color="#073763"/>
    </style:style>
    <style:style style:family="graphic" style:name="gr5">
      <style:graphic-properties draw:fill="solid" draw:fill-color="#fff2cc"/>
    </style:style>
    <style:style style:family="graphic" style:name="gr6">
      <style:graphic-properties draw:fill="solid" draw:fill-color="#fff2cc" draw:stroke="solid"/>
    </style:style>
    <style:style style:family="graphic" style:name="gr7">
      <style:graphic-properties draw:fill="solid" draw:fill-color="#fff2cc" draw:stroke="solid" svg:stroke-color="#7f6000"/>
    </style:style>
    <style:style style:family="graphic" style:name="gr8">
      <style:graphic-properties draw:fill="solid" draw:fill-color="#d9ead3"/>
    </style:style>
    <style:style style:family="graphic" style:name="gr9">
      <style:graphic-properties draw:fill="solid" draw:fill-color="#d9ead3" draw:stroke="solid"/>
    </style:style>
    <style:style style:family="graphic" style:name="gr10">
      <style:graphic-properties draw:fill="solid" draw:fill-color="#d9ead3" draw:stroke="solid" svg:stroke-color="#274e13"/>
    </style:style>
  </office:automatic-styles>
  <office:body>
    <office:drawing>
      <draw:page draw:name="主流程">
        <draw:layer-set>
          <draw:layer draw:name="背景" draw:protected="true" draw:display="screen"/>
          <draw:layer draw:name="流程" draw:display="screen"/>
        </draw:layer-set>
        <draw:rect draw:id="load" xml:id="load" svg:x="1cm" svg:y="1cm" svg:width="4cm" svg:height="1.4cm" draw:style-name="gr4" draw:layer="流程"/>
        <draw:ellipse draw:id="validate" xml:id="validate" svg:x="7cm" svg:y="1cm" svg:width="4cm" svg:height="1.4cm" draw:style-name="gr7" draw:layer="流程"/>
        <draw:rect draw:id="export" xml:id="export" svg:x="13cm" svg:y="1cm" svg:width="4cm" svg:height="1.4cm" draw:style-name="gr10" draw:layer="流程"/>
        <draw:connector draw:id="shp_90f145fd" xml:id="shp_90f145fd" draw:start-shape="load" draw:end-shape="validate" draw:type="straight"/>
        <draw:connector draw:id="shp_7a44097b" xml:id="shp_7a44097b" draw:start-shape="validate" draw:end-shape="export" draw:type="straight"/>
        <draw:frame draw:id="frm_45d25661" xml:id="frm_45d25661" svg:x="1.3cm" svg:y="1.25cm" svg:width="3.4cm" svg:height="0.7cm">
          <draw:text-box>
            <text:p>載入 ODF</text:p>
          </draw:text-box>
        </draw:frame>
        <draw:frame draw:id="frm_55b0f431" xml:id="frm_55b0f431" svg:x="7.3cm" svg:y="1.25cm" svg:width="3.4cm" svg:height="0.7cm">
          <draw:text-box>
            <text:p>驗證封裝</text:p>
          </draw:text-box>
        </draw:frame>
        <draw:frame draw:id="frm_0b35cfc7" xml:id="frm_0b35cfc7" svg:x="13.3cm" svg:y="1.25cm" svg:width="3.4cm" svg:height="0.7cm">
          <draw:text-box>
            <text:p>輸出報告</text:p>
          </draw:text-box>
        </draw:frame>
        <draw:g draw:id="grp_036fff0e" xml:id="grp_036fff0e" draw:name="圖例">
          <draw:rect draw:id="shp_d2063056" svg:x="13cm" svg:y="4cm" svg:width="1cm" svg:height="1cm" draw:style-name="gr8"/>
          <draw:frame draw:id="frm_87fee7b5" svg:x="14.2cm" svg:y="4cm" svg:width="3cm" svg:height="1cm" draw:anchor-type="page">
            <draw:text-box>
              <text:p>完成節點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office:version="1.4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4">
  <office:meta>
    <dc:title>匯入流程</dc:title>
    <meta:document-statistic meta:word-count="5" meta:character-count="18" meta:paragraph-count="4" meta:table-count="0" meta:image-count="0" meta:page-count="1"/>
  </office:meta>
</office:document-meta>
</file>