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config="urn:oasis:names:tc:opendocument:xmlns:config:1.0" office:version="1.4">
  <office:meta/>
</office:document-meta>
</file>