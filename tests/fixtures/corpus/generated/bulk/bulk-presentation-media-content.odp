
<file path=META-INF/manifest.xml><?xml version="1.0" encoding="utf-8"?>
<manifest:manifest xmlns:manifest="urn:oasis:names:tc:opendocument:xmlns:manifest:1.0" manifest:version="1.4">
  <manifest:file-entry manifest:full-path="/" manifest:media-type="application/vnd.oasis.opendocument.presentation" manifest:version="1.4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config="urn:oasis:names:tc:opendocument:xmlns:config:1.0" office:version="1.4">
  <office:body>
    <office:presentation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config="urn:oasis:names:tc:opendocument:xmlns:config:1.0" office:version="1.4">
  <office:styles/>
  <office:automatic-styles/>
  <office:master-styles/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config="urn:oasis:names:tc:opendocument:xmlns:config:1.0" office:version="1.4">
  <office:meta/>
</office:document-meta>
</file>